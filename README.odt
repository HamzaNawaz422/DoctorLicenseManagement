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AF00000056EF4145BEB.png" manifest:media-type="image/png"/>
  <manifest:file-entry manifest:full-path="Pictures/1000000100000A0A0000059AA8CC045F.png" manifest:media-type="image/png"/>
  <manifest:file-entry manifest:full-path="Pictures/1000000100000AA00000068A1BCC1EB1.png" manifest:media-type="image/png"/>
  <manifest:file-entry manifest:full-path="Pictures/1000000100000648000004341311AF81.png" manifest:media-type="image/png"/>
  <manifest:file-entry manifest:full-path="Pictures/100000010000075E0000048222CEA290.png" manifest:media-type="image/png"/>
  <manifest:file-entry manifest:full-path="Pictures/1000000100000A3E00000384B17CE0F3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5">
      <style:paragraph-properties fo:margin-top="0in" fo:margin-bottom="0in" style:contextual-spacing="false"/>
    </style:style>
    <style:style style:name="P7" style:family="paragraph" style:parent-style-name="Preformatted_20_Text">
      <style:paragraph-properties fo:margin-top="0in" fo:margin-bottom="0.1965in" style:contextual-spacing="false"/>
    </style:style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able_20_Heading">
      <style:paragraph-properties fo:text-align="left" style:justify-single-word="false"/>
    </style:style>
    <style:style style:name="P11" style:family="paragraph" style:parent-style-name="Table_20_Contents">
      <style:paragraph-properties fo:text-align="left" style:justify-single-word="false"/>
    </style:style>
    <style:style style:name="P12" style:family="paragraph" style:parent-style-name="Heading_20_2">
      <style:paragraph-properties fo:keep-with-next="always"/>
      <style:text-properties style:font-name="Liberation Sans" style:font-name-asian="Microsoft YaHei" style:font-name-complex="Lucida Sans1"/>
    </style:style>
    <style:style style:name="P13" style:family="paragraph" style:parent-style-name="Text_20_body">
      <style:text-properties style:font-name="Liberation Sans" style:font-name-asian="Microsoft YaHei" style:font-name-complex="Lucida Sans1"/>
    </style:style>
    <style:style style:name="P14" style:family="paragraph" style:parent-style-name="Text_20_body" style:list-style-name="L8"/>
    <style:style style:name="T1" style:family="text">
      <style:text-properties officeooo:rsid="00188448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octor License Management System</text:h>
      <text:p text:style-name="Text_20_body">A full-stack Doctor License Management module built for a Medical SaaS platform technical assessment.</text:p>
      <text:h text:style-name="Heading_20_2" text:outline-level="2">Tech Stack</text:h>
      <text:h text:style-name="Heading_20_3" text:outline-level="3">Backend</text:h>
      <text:list text:style-name="L1">
        <text:list-item>
          <text:p text:style-name="P1">ASP.NET Core 8 Web API</text:p>
        </text:list-item>
        <text:list-item>
          <text:p text:style-name="P1">Clean Architecture</text:p>
        </text:list-item>
        <text:list-item>
          <text:p text:style-name="P1">CQRS with MediatR</text:p>
        </text:list-item>
        <text:list-item>
          <text:p text:style-name="P1">Entity Framework Core</text:p>
        </text:list-item>
        <text:list-item>
          <text:p text:style-name="P1">SQL Server</text:p>
        </text:list-item>
        <text:list-item>
          <text:p text:style-name="P1">Dapper</text:p>
        </text:list-item>
        <text:list-item>
          <text:p text:style-name="P1">FluentValidation</text:p>
        </text:list-item>
        <text:list-item>
          <text:p text:style-name="P1">AutoMapper</text:p>
        </text:list-item>
        <text:list-item>
          <text:p text:style-name="P1">Swagger</text:p>
        </text:list-item>
      </text:list>
      <text:h text:style-name="Heading_20_3" text:outline-level="3" text:is-list-header="true">Frontend</text:h>
      <text:list text:style-name="L2">
        <text:list-item>
          <text:p text:style-name="P2">Next.js (App Router)</text:p>
        </text:list-item>
        <text:list-item>
          <text:p text:style-name="P2">TypeScript</text:p>
        </text:list-item>
        <text:list-item>
          <text:p text:style-name="P2">Tailwind CSS</text:p>
        </text:list-item>
      </text:list>
      <text:p text:style-name="Horizontal_20_Line"/>
      <text:h text:style-name="Heading_20_1" text:outline-level="1">Features</text:h>
      <text:h text:style-name="Heading_20_2" text:outline-level="2">Backend Features</text:h>
      <text:list text:style-name="L3">
        <text:list-item>
          <text:p text:style-name="P3">CRUD operations for doctors</text:p>
        </text:list-item>
        <text:list-item>
          <text:p text:style-name="P3">CQRS pattern using MediatR</text:p>
        </text:list-item>
        <text:list-item>
          <text:p text:style-name="P3">Repository Pattern</text:p>
        </text:list-item>
        <text:list-item>
          <text:p text:style-name="P3">Global Exception Middleware</text:p>
        </text:list-item>
        <text:list-item>
          <text:p text:style-name="P3">FluentValidation request validation</text:p>
        </text:list-item>
        <text:list-item>
          <text:p text:style-name="P3">AutoMapper object mapping</text:p>
        </text:list-item>
        <text:list-item>
          <text:p text:style-name="P3">Soft delete support</text:p>
        </text:list-item>
        <text:list-item>
          <text:p text:style-name="P3">Pagination support</text:p>
        </text:list-item>
        <text:list-item>
          <text:p text:style-name="P3"><text:soft-page-break/>SQL Server stored procedure integration</text:p>
        </text:list-item>
        <text:list-item>
          <text:p text:style-name="P3">Search &amp; filter support</text:p>
        </text:list-item>
      </text:list>
      <text:h text:style-name="Heading_20_2" text:outline-level="2" text:is-list-header="true">Frontend Features</text:h>
      <text:list text:style-name="L4">
        <text:list-item>
          <text:p text:style-name="P4">Doctor listing table</text:p>
        </text:list-item>
        <text:list-item>
          <text:p text:style-name="P4">Search by name/license</text:p>
        </text:list-item>
        <text:list-item>
          <text:p text:style-name="P4">Filter by status</text:p>
        </text:list-item>
        <text:list-item>
          <text:p text:style-name="P4">Pagination</text:p>
        </text:list-item>
        <text:list-item>
          <text:p text:style-name="P4">Add doctor modal</text:p>
        </text:list-item>
        <text:list-item>
          <text:p text:style-name="P4">Edit doctor modal</text:p>
        </text:list-item>
        <text:list-item>
          <text:p text:style-name="P4">Delete doctor</text:p>
        </text:list-item>
        <text:list-item>
          <text:p text:style-name="P4">Status badges</text:p>
        </text:list-item>
        <text:list-item>
          <text:p text:style-name="P4">Expired doctor highlighting</text:p>
        </text:list-item>
        <text:list-item>
          <text:p text:style-name="P4">Loading states</text:p>
        </text:list-item>
        <text:list-item>
          <text:p text:style-name="P4">Responsive modern UI</text:p>
        </text:list-item>
      </text:list>
      <text:p text:style-name="Horizontal_20_Line"/>
      <text:h text:style-name="Heading_20_1" text:outline-level="1">Business Rules</text:h>
      <text:list text:style-name="L5">
        <text:list-item>
          <text:p text:style-name="P5">Duplicate license numbers are not allowed</text:p>
        </text:list-item>
        <text:list-item>
          <text:p text:style-name="P5">Expired licenses are automatically marked as Expired</text:p>
        </text:list-item>
        <text:list-item>
          <text:p text:style-name="P5">Soft delete is implemented</text:p>
        </text:list-item>
        <text:list-item>
          <text:p text:style-name="P6">Search supports:</text:p>
          <text:list>
            <text:list-item>
              <text:p text:style-name="P5">Doctor name</text:p>
            </text:list-item>
            <text:list-item>
              <text:p text:style-name="P5">License number</text:p>
            </text:list-item>
          </text:list>
        </text:list-item>
        <text:list-item>
          <text:p text:style-name="P6">Filter supports:</text:p>
          <text:list>
            <text:list-item>
              <text:p text:style-name="P5">Active</text:p>
            </text:list-item>
            <text:list-item>
              <text:p text:style-name="P5">Expired</text:p>
            </text:list-item>
            <text:list-item>
              <text:p text:style-name="P5">Suspended</text:p>
            </text:list-item>
          </text:list>
        </text:list-item>
      </text:list>
      <text:p text:style-name="Horizontal_20_Line"/>
      <text:h text:style-name="Heading_20_1" text:outline-level="1">Architecture</text:h>
      <text:h text:style-name="Heading_20_2" text:outline-level="2">Backend Architecture</text:h>
      <text:p text:style-name="Text_20_body">The backend follows Clean Architecture principles:</text:p>
      <text:p text:style-name="P7"><text:soft-page-break/>DoctorLicenseManagement<text:line-break/>│<text:line-break/>├── API<text:line-break/>├── Application<text:line-break/>├── Domain<text:line-break/>└── Infrastructure</text:p>
      <text:h text:style-name="Heading_20_3" text:outline-level="3">Design Patterns Used</text:h>
      <text:list text:style-name="L6">
        <text:list-item>
          <text:p text:style-name="P8">CQRS</text:p>
        </text:list-item>
        <text:list-item>
          <text:p text:style-name="P8">Repository Pattern</text:p>
        </text:list-item>
        <text:list-item>
          <text:p text:style-name="P8">Dependency Injection</text:p>
        </text:list-item>
        <text:list-item>
          <text:p text:style-name="P8">Middleware Pattern</text:p>
        </text:list-item>
      </text:list>
      <text:p text:style-name="Horizontal_20_Line"/>
      <text:h text:style-name="Heading_20_1" text:outline-level="1">Stored Procedure</text:h>
      <text:p text:style-name="Text_20_body">Doctor listing uses SQL Server stored procedure with:</text:p>
      <text:list text:style-name="L7">
        <text:list-item>
          <text:p text:style-name="P9">Search</text:p>
        </text:list-item>
        <text:list-item>
          <text:p text:style-name="P9">Status filter</text:p>
        </text:list-item>
        <text:list-item>
          <text:p text:style-name="P9">Pagination</text:p>
        </text:list-item>
        <text:list-item>
          <text:p text:style-name="P9">Expiry status logic</text:p>
        </text:list-item>
      </text:list>
      <text:p text:style-name="Text_20_body">Stored Procedure:</text:p>
      <text:p text:style-name="P7">sp_GetDoctors</text:p>
      <text:p text:style-name="Horizontal_20_Line"/>
      <text:h text:style-name="Heading_20_1" text:outline-level="1">Setup Instructions</text:h>
      <text:h text:style-name="Heading_20_2" text:outline-level="2">Backend Setup</text:h>
      <text:h text:style-name="Heading_20_3" text:outline-level="3">1. Navigate to backend</text:h>
      <text:p text:style-name="P7">cd backend</text:p>
      <text:h text:style-name="Heading_20_3" text:outline-level="3">2. Update connection string</text:h>
      <text:p text:style-name="Text_20_body">Update:</text:p>
      <text:p text:style-name="P7">DoctorLicenseManagement.API/appsettings.json</text:p>
      <text:h text:style-name="Heading_20_3" text:outline-level="3">3. Apply database migrations</text:h>
      <text:p text:style-name="P7">dotnet ef database update</text:p>
      <text:h text:style-name="Heading_20_3" text:outline-level="3"><text:soft-page-break/>4. Run API</text:h>
      <text:p text:style-name="P7">dotnet run --project DoctorLicenseManagement.API</text:p>
      <text:p text:style-name="Text_20_body">Swagger:</text:p>
      <text:p text:style-name="P7">https://localhost:xxxx/swagger</text:p>
      <text:p text:style-name="Horizontal_20_Line"/>
      <text:h text:style-name="Heading_20_1" text:outline-level="1">Frontend Setup</text:h>
      <text:h text:style-name="Heading_20_2" text:outline-level="2">1. Navigate to frontend</text:h>
      <text:p text:style-name="P7">cd frontend</text:p>
      <text:h text:style-name="Heading_20_2" text:outline-level="2">2. Install dependencies</text:h>
      <text:p text:style-name="P7">npm install</text:p>
      <text:h text:style-name="Heading_20_2" text:outline-level="2">3. Configure environment</text:h>
      <text:p text:style-name="Text_20_body">Create:</text:p>
      <text:p text:style-name="P7">.env.local</text:p>
      <text:p text:style-name="Text_20_body">Add:</text:p>
      <text:p text:style-name="P7">NEXT_PUBLIC_API_BASE_URL=https://localhost:xxxx/api</text:p>
      <text:h text:style-name="Heading_20_2" text:outline-level="2">4. Run frontend</text:h>
      <text:p text:style-name="P7">npm run dev</text:p>
      <text:p text:style-name="Text_20_body">Frontend:</text:p>
      <text:p text:style-name="P7">http://localhost:3000</text:p>
      <text:p text:style-name="Horizontal_20_Line"/>
      <text:h text:style-name="Heading_20_1" text:outline-level="1">API Endpoints</text:h>
      <table:table table:name="Table1" table:style-name="Table1">
        <table:table-column table:style-name="Table1.A" table:number-columns-repeated="3"/>
        <table:table-header-rows>
          <table:table-row>
            <table:table-cell table:style-name="Table1.A1" office:value-type="string">
              <text:p text:style-name="P10">Method</text:p>
            </table:table-cell>
            <table:table-cell table:style-name="Table1.A1" office:value-type="string">
              <text:p text:style-name="P10">Endpoint</text:p>
            </table:table-cell>
            <table:table-cell table:style-name="Table1.C1" office:value-type="string">
              <text:p text:style-name="P10">Description</text:p>
            </table:table-cell>
          </table:table-row>
        </table:table-header-rows>
        <table:table-row>
          <table:table-cell table:style-name="Table1.A2" office:value-type="string">
            <text:p text:style-name="P11">GET</text:p>
          </table:table-cell>
          <table:table-cell table:style-name="Table1.A2" office:value-type="string">
            <text:p text:style-name="P11">/api/doctors</text:p>
          </table:table-cell>
          <table:table-cell table:style-name="Table1.C2" office:value-type="string">
            <text:p text:style-name="P11">Get doctors</text:p>
          </table:table-cell>
        </table:table-row>
        <table:table-row>
          <table:table-cell table:style-name="Table1.A2" office:value-type="string">
            <text:p text:style-name="P11">GET</text:p>
          </table:table-cell>
          <table:table-cell table:style-name="Table1.A2" office:value-type="string">
            <text:p text:style-name="P11">/api/doctors/{id}</text:p>
          </table:table-cell>
          <table:table-cell table:style-name="Table1.C2" office:value-type="string">
            <text:p text:style-name="P11">Get doctor by id</text:p>
          </table:table-cell>
        </table:table-row>
        <table:table-row>
          <table:table-cell table:style-name="Table1.A2" office:value-type="string">
            <text:p text:style-name="P11">POST</text:p>
          </table:table-cell>
          <table:table-cell table:style-name="Table1.A2" office:value-type="string">
            <text:p text:style-name="P11">/api/doctors</text:p>
          </table:table-cell>
          <table:table-cell table:style-name="Table1.C2" office:value-type="string">
            <text:p text:style-name="P11">Create doctor</text:p>
          </table:table-cell>
        </table:table-row>
        <table:table-row>
          <table:table-cell table:style-name="Table1.A2" office:value-type="string">
            <text:p text:style-name="P11">PUT</text:p>
          </table:table-cell>
          <table:table-cell table:style-name="Table1.A2" office:value-type="string">
            <text:p text:style-name="P11">/api/doctors/{id}</text:p>
          </table:table-cell>
          <table:table-cell table:style-name="Table1.C2" office:value-type="string">
            <text:p text:style-name="P11">Update doctor</text:p>
          </table:table-cell>
        </table:table-row>
        <table:table-row>
          <table:table-cell table:style-name="Table1.A2" office:value-type="string">
            <text:p text:style-name="P11">PATCH</text:p>
          </table:table-cell>
          <table:table-cell table:style-name="Table1.A2" office:value-type="string">
            <text:p text:style-name="P11">/api/doctors/{id}/status</text:p>
          </table:table-cell>
          <table:table-cell table:style-name="Table1.C2" office:value-type="string">
            <text:p text:style-name="P11">Update status</text:p>
          </table:table-cell>
        </table:table-row>
        <table:table-row>
          <table:table-cell table:style-name="Table1.A2" office:value-type="string">
            <text:p text:style-name="P11">DELETE</text:p>
          </table:table-cell>
          <table:table-cell table:style-name="Table1.A2" office:value-type="string">
            <text:p text:style-name="P11">/api/doctors/{id}</text:p>
          </table:table-cell>
          <table:table-cell table:style-name="Table1.C2" office:value-type="string">
            <text:p text:style-name="P11">Soft delete doctor</text:p>
          </table:table-cell>
        </table:table-row>
      </table:table>
      <text:p text:style-name="Text_20_body"/>
      <text:p text:style-name="Horizontal_20_Line"><text:soft-page-break/></text:p>
      <text:h text:style-name="Heading_20_1" text:outline-level="1">Screenshots</text:h>
      <text:p text:style-name="Text_20_body"/>
      <text:h text:style-name="P12" text:outline-level="2">Swagger</text:h>
      <text:p text:style-name="P13"/>
      <text:p text:style-name="P13"><draw:frame draw:style-name="fr1" draw:name="Image6" text:anchor-type="char" svg:width="5.7409in" svg:height="2.85in" draw:z-index="5"><draw:image xlink:href="Pictures/1000000100000AF00000056EF4145BEB.png" xlink:type="simple" xlink:show="embed" xlink:actuate="onLoad" draw:mime-type="image/png"/></draw:frame></text:p>
      <text:h text:style-name="Heading_20_2" text:outline-level="2">Doctor Listing</text:h>
      <text:p text:style-name="Text_20_body"><draw:frame draw:style-name="fr2" draw:name="Image1" text:anchor-type="char" svg:width="5.6618in" svg:height="3.4839in" draw:z-index="2"><draw:image xlink:href="Pictures/1000000100000AA00000068A1BCC1EB1.png" xlink:type="simple" xlink:show="embed" xlink:actuate="onLoad" draw:mime-type="image/png"/></draw:frame></text:p>
      <text:h text:style-name="Heading_20_2" text:outline-level="2"><text:soft-page-break/>Add/Edit Modal</text:h>
      <text:p text:style-name="Text_20_body"><draw:frame draw:style-name="fr2" draw:name="Image2" text:anchor-type="char" svg:width="4.4673in" svg:height="2.3445in" draw:z-index="0"><draw:image xlink:href="Pictures/100000010000075E0000048222CEA290.png" xlink:type="simple" xlink:show="embed" xlink:actuate="onLoad" draw:mime-type="image/png"/></draw:frame></text:p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><draw:frame draw:style-name="fr2" draw:name="Image3" text:anchor-type="char" svg:width="5.5728in" svg:height="3.7291in" draw:z-index="1"><draw:image xlink:href="Pictures/1000000100000648000004341311AF81.png" xlink:type="simple" xlink:show="embed" xlink:actuate="onLoad" draw:mime-type="image/png"/></draw:frame></text:h>
      <text:h text:style-name="Heading_20_2" text:outline-level="2"/>
      <text:p text:style-name="Text_20_body"/>
      <text:p text:style-name="Text_20_body"/>
      <text:h text:style-name="Heading_20_2" text:outline-level="2">Pagination &amp; Filters</text:h>
      <text:p text:style-name="Text_20_body"/>
      <text:p text:style-name="Text_20_body"><draw:frame draw:style-name="fr3" draw:name="Image4" text:anchor-type="char" svg:x="0.7043in" svg:y="0.0819in" svg:width="5.0244in" svg:height="1.7244in" draw:z-index="3"><draw:image xlink:href="Pictures/1000000100000A3E00000384B17CE0F3.png" xlink:type="simple" xlink:show="embed" xlink:actuate="onLoad" draw:mime-type="image/png"/></draw:frame></text:p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Image5" text:anchor-type="char" svg:width="5.6929in" svg:height="3.1764in" draw:z-index="4"><draw:image xlink:href="Pictures/1000000100000A0A0000059AA8CC045F.png" xlink:type="simple" xlink:show="embed" xlink:actuate="onLoad" draw:mime-type="image/png"/></draw:frame></text:p>
      <text:p text:style-name="Horizontal_20_Line"/>
      <text:h text:style-name="Heading_20_1" text:outline-level="1">Technical Decisions</text:h>
      <text:list text:style-name="L8">
        <text:list-item>
          <text:p text:style-name="P14">Used CQRS + MediatR for separation of concerns</text:p>
        </text:list-item>
        <text:list-item>
          <text:p text:style-name="P14">Used Dapper for stored procedure execution</text:p>
        </text:list-item>
        <text:list-item>
          <text:p text:style-name="P14">Used EF Core for transactional operations</text:p>
        </text:list-item>
        <text:list-item>
          <text:p text:style-name="P14">Used AutoMapper for clean object mapping</text:p>
        </text:list-item>
        <text:list-item>
          <text:p text:style-name="P14">Used FluentValidation for request validation</text:p>
        </text:list-item>
        <text:list-item>
          <text:p text:style-name="P14">Used Tailwind CSS for fast modern UI development</text:p>
        </text:list-item>
      </text:list>
      <text:p text:style-name="Horizontal_20_Line"/>
      <text:h text:style-name="Heading_20_1" text:outline-level="1">Author</text:h>
      <text:p text:style-name="Text_20_body"><text:span text:style-name="T1">Hafiz Muhammad </text:span>Hamza Nawaz Senior .NET Backend Engineer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E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AE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9T00:30:07.151450600</meta:creation-date>
    <dc:date>2026-05-09T00:37:08.052497300</dc:date>
    <meta:editing-duration>PT7M2S</meta:editing-duration>
    <meta:editing-cycles>2</meta:editing-cycles>
    <meta:generator>LibreOffice/26.2.1.2$Windows_X86_64 LibreOffice_project/620$Build-2</meta:generator>
    <meta:document-statistic meta:table-count="1" meta:image-count="6" meta:object-count="0" meta:page-count="7" meta:paragraph-count="132" meta:word-count="402" meta:character-count="2646" meta:non-whitespace-character-count="2434"/>
  </office:meta>
</office:document-meta>
</file>